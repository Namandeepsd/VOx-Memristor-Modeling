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4000001C23E005757.png" manifest:media-type="image/png"/>
  <manifest:file-entry manifest:full-path="Pictures/1000000100000384000001C224B6B09D.png" manifest:media-type="image/png"/>
  <manifest:file-entry manifest:full-path="Pictures/1000000100000384000001C2A386F4CC.png" manifest:media-type="image/png"/>
  <manifest:file-entry manifest:full-path="Pictures/1000000100000384000001C20EEA5725.png" manifest:media-type="image/png"/>
  <manifest:file-entry manifest:full-path="Pictures/1000000100000384000002580C69A285.png" manifest:media-type="image/png"/>
  <manifest:file-entry manifest:full-path="Pictures/1000000100000384000001C266F14E94.png" manifest:media-type="image/png"/>
  <manifest:file-entry manifest:full-path="Pictures/100000010000038400000258AE29148D.png" manifest:media-type="image/png"/>
  <manifest:file-entry manifest:full-path="Pictures/1000000100000384000001C2C15C34C3.png" manifest:media-type="image/png"/>
  <manifest:file-entry manifest:full-path="Pictures/100000010000038400000258217FDB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.139in" style:contextual-spacing="false"/>
    </style:style>
    <style:style style:name="P2" style:family="paragraph" style:parent-style-name="Text_20_body">
      <style:paragraph-properties fo:margin-top="0in" fo:margin-bottom="0.139in" style:contextual-spacing="false"/>
    </style:style>
    <style:style style:name="P3" style:family="paragraph" style:parent-style-name="Quotations">
      <style:paragraph-properties fo:margin-top="0in" fo:margin-bottom="0.139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Horizontal_20_Line">
      <style:paragraph-properties fo:margin-top="0in" fo:margin-bottom="0.139in" style:contextual-spacing="false"/>
    </style:style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Heading_20_2">
      <style:paragraph-properties fo:margin-top="0in" fo:margin-bottom="0in" style:contextual-spacing="false" fo:break-before="page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Memristor Documentation</text:p>
      <text:h text:style-name="Heading_20_1" text:outline-level="1">ProjectMemristor Documentation</text:h>
      <text:p text:style-name="Standard"/>
      <text:h text:style-name="Heading_20_2" text:outline-level="2">Overview</text:h>
      <text:p text:style-name="Standard">This project implements the HP TiO2 memristor model (Strukov et al., 2008) with a Joglekar window function to keep the ion-drift boundary behavior physical. The primary implementation is `src/memristor/hp.py` which provides the `HPMemristor` class.</text:p>
      <text:p text:style-name="Standard"/>
      <text:h text:style-name="Heading_20_2" text:outline-level="2">Governing equations</text:h>
      <text:h text:style-name="P1" text:outline-level="2">1. Memristance Equation</text:h>
      <text:p text:style-name="P2">M(x)=Ron​x+Roff​(1−x) </text:p>
      <text:p text:style-name="P2">This says:</text:p>
      <text:p text:style-name="P3"><text:span text:style-name="Strong_20_Emphasis">The resistance depends on the internal state x.</text:span></text:p>
      <text:p text:style-name="P2">Here,</text:p>
      <text:list text:style-name="L1">
        <text:list-item>
          <text:p text:style-name="P4">Ron​ = minimum resistance (device fully ON) </text:p>
        </text:list-item>
        <text:list-item>
          <text:p text:style-name="P4">Roff​ = maximum resistance (device fully OFF) </text:p>
        </text:list-item>
        <text:list-item>
          <text:p text:style-name="P5">x = fraction of the conducting (doped) region </text:p>
        </text:list-item>
      </text:list>
      <text:p text:style-name="P2">Since 0≤x≤1,</text:p>
      <text:p text:style-name="P2">If</text:p>
      <text:list text:style-name="L2">
        <text:list-item>
          <text:p text:style-name="P6">x=1 </text:p>
        </text:list-item>
      </text:list>
      <text:p text:style-name="P2">then</text:p>
      <text:p text:style-name="P2">M=Ron​ </text:p>
      <text:p text:style-name="P2">meaning completely ON.</text:p>
      <text:p text:style-name="P2">If</text:p>
      <text:list text:style-name="L3">
        <text:list-item>
          <text:p text:style-name="P7"><text:soft-page-break/>x=0 </text:p>
        </text:list-item>
      </text:list>
      <text:p text:style-name="P2">then</text:p>
      <text:p text:style-name="P2">M=Roff​ </text:p>
      <text:p text:style-name="P2">meaning completely OFF.</text:p>
      <text:p text:style-name="P2">If</text:p>
      <text:p text:style-name="P2">x=0.5 </text:p>
      <text:p text:style-name="P2">then</text:p>
      <text:p text:style-name="P2">M=2Ron​+Roff​​ </text:p>
      <text:p text:style-name="P2">So this equation is simply <text:span text:style-name="Strong_20_Emphasis">linear interpolation</text:span> between the two resistance states.</text:p>
      <text:p text:style-name="P8"/>
      <text:h text:style-name="P1" text:outline-level="2">2. Current Equation</text:h>
      <text:p text:style-name="P2">i(t)=M(x(t))v(t)​ </text:p>
      <text:p text:style-name="P2">This is simply <text:span text:style-name="Strong_20_Emphasis">Ohm's Law</text:span>.</text:p>
      <text:p text:style-name="P2">Voltage is applied.</text:p>
      <text:p text:style-name="P2">Resistance depends on the state.</text:p>
      <text:p text:style-name="P2">Therefore current becomes</text:p>
      <text:p text:style-name="P2">I=RV​ </text:p>
      <text:p text:style-name="P2">Nothing special here except that <text:span text:style-name="Strong_20_Emphasis">R is changing continuously</text:span>, so current changes even if voltage is constant.</text:p>
      <text:p text:style-name="P8"/>
      <text:h text:style-name="P1" text:outline-level="2">3. Window Function</text:h>
      <text:p text:style-name="P2">f(x;p)=1−(2x−1)2p </text:p>
      <text:p text:style-name="P2">This is called the <text:span text:style-name="Strong_20_Emphasis">Joglekar Window Function</text:span>.</text:p>
      <text:p text:style-name="P2">Its purpose is to slow down the movement of ions near the boundaries.</text:p>
      <text:p text:style-name="P2">Without this function,</text:p>
      <text:p text:style-name="P2"><text:soft-page-break/>the state variable may become</text:p>
      <text:p text:style-name="P2">x&gt;1 </text:p>
      <text:p text:style-name="P2">or</text:p>
      <text:p text:style-name="P2">x&lt;0 </text:p>
      <text:p text:style-name="P2">which is physically impossible.</text:p>
      <text:p text:style-name="P2">Let's see:</text:p>
      <text:p text:style-name="P2">If</text:p>
      <text:p text:style-name="P2">x=0 </text:p>
      <text:p text:style-name="P2">then</text:p>
      <text:p text:style-name="P2">f=0 </text:p>
      <text:p text:style-name="P2">If</text:p>
      <text:p text:style-name="P2">x=1 </text:p>
      <text:p text:style-name="P2">then</text:p>
      <text:p text:style-name="P2">f=0 </text:p>
      <text:p text:style-name="P2">If</text:p>
      <text:p text:style-name="P2">x=0.5 </text:p>
      <text:p text:style-name="P2">then</text:p>
      <text:p text:style-name="P2">f=1 </text:p>
      <text:p text:style-name="P2">So,</text:p>
      <text:p text:style-name="P2">the ions move fastest in the middle and almost stop near the edges.</text:p>
      <text:p text:style-name="P2">Changing p:</text:p>
      <text:list text:style-name="L4">
        <text:list-item>
          <text:p text:style-name="P9">small p: gentle slowing </text:p>
        </text:list-item>
        <text:list-item>
          <text:p text:style-name="P10">large p: sharp slowing near the boundaries </text:p>
        </text:list-item>
      </text:list>
      <text:p text:style-name="P8"/>
      <text:h text:style-name="P1" text:outline-level="2"><text:soft-page-break/>4. Constant</text:h>
      <text:p text:style-name="P2">k=D2μv​Ron​​ </text:p>
      <text:p text:style-name="P2">This combines several physical constants.</text:p>
      <text:p text:style-name="P2">Where</text:p>
      <text:list text:style-name="L5">
        <text:list-item>
          <text:p text:style-name="P11">μv​ = mobility of oxygen vacancies </text:p>
        </text:list-item>
        <text:list-item>
          <text:p text:style-name="P11">Ron​ = ON resistance </text:p>
        </text:list-item>
        <text:list-item>
          <text:p text:style-name="P12">D = oxide thickness </text:p>
        </text:list-item>
      </text:list>
      <text:p text:style-name="P2">It tells how quickly the state changes.</text:p>
      <text:p text:style-name="P2">Large mobility →</text:p>
      <text:p text:style-name="P2">large k</text:p>
      <text:p text:style-name="P2">→ faster switching.</text:p>
      <text:p text:style-name="P2">Larger device thickness →</text:p>
      <text:p text:style-name="P2">smaller k</text:p>
      <text:p text:style-name="P2">→ slower switching.</text:p>
      <text:p text:style-name="P8"/>
      <text:h text:style-name="P1" text:outline-level="2">5. State Equation</text:h>
      <text:p text:style-name="P2">dtdx​=ki(t)f(x;p) </text:p>
      <text:p text:style-name="P2">This is the <text:span text:style-name="Strong_20_Emphasis">heart of the memristor model</text:span>.</text:p>
      <text:p text:style-name="P2">It says</text:p>
      <text:p text:style-name="P3"><text:span text:style-name="Strong_20_Emphasis">The internal state changes according to the current flowing through the device.</text:span></text:p>
      <text:p text:style-name="P2">Breaking it down:</text:p>
      <text:list text:style-name="L6">
        <text:list-item>
          <text:p text:style-name="P13">More current → faster change. </text:p>
        </text:list-item>
        <text:list-item>
          <text:p text:style-name="P13">Larger mobility → faster change. </text:p>
        </text:list-item>
        <text:list-item>
          <text:p text:style-name="P13">Near the boundaries → the window function slows the change. </text:p>
        </text:list-item>
        <text:list-item>
          <text:p text:style-name="P14">Zero current → no state change. </text:p>
        </text:list-item>
      </text:list>
      <text:p text:style-name="P2"><text:soft-page-break/>This equation tells you how the conductive region grows or shrinks over time.</text:p>
      <text:p text:style-name="Standard"/>
      <text:h text:style-name="Heading_20_2" text:outline-level="2">Implementation notes</text:h>
      <text:p text:style-name="Standard">- `HPMemristor` methods:</text:p>
      <text:p text:style-name="Standard"><text:s text:c="2"/>- `current(voltage)` — returns instantaneous current given `voltage` and current `x`.</text:p>
      <text:p text:style-name="Standard"><text:s text:c="2"/>- `dxdt(voltage)` / `dxdt_from_current(i)` — compute state derivative.</text:p>
      <text:p text:style-name="Standard"><text:s text:c="2"/>- `update_state(voltage, dt)` — integrate state forward using Euler step and clip to [0,1].</text:p>
      <text:p text:style-name="Standard"><text:s text:c="2"/>- `apply_voltage(voltage, dt)` — compute current at start of step, integrate state, and return the pre-update current.</text:p>
      <text:p text:style-name="Standard"/>
      <text:h text:style-name="Heading_20_2" text:outline-level="2">How to reproduce plots</text:h>
      <text:p text:style-name="Standard">A script `tests/hp_simulations.py` is provided to run three different input parameter sets and save plots:</text:p>
      <text:p text:style-name="Standard">- V-I hysteresis (voltage vs current)</text:p>
      <text:p text:style-name="Standard">- State variable vs time (x vs t)</text:p>
      <text:p text:style-name="Standard">- Memristance vs time (R vs t)</text:p>
      <text:p text:style-name="Standard"/>
      <text:p text:style-name="Standard">Run the script from the project root after activating the virtualenv:</text:p>
      <text:p text:style-name="Standard"/>
      <text:p text:style-name="Standard">source .venv/bin/activate</text:p>
      <text:p text:style-name="Standard">python tests/hp_simulations.py</text:p>
      <text:p text:style-name="Standard"/>
      <text:p text:style-name="Standard">The script saves PNG files into the project root named:</text:p>
      <text:p text:style-name="Standard">- `hp_vi_set1.png`, `hp_x_set1.png`, `hp_r_set1.png` (and likewise for `set2`, `set3`).</text:p>
      <text:p text:style-name="Standard"><text:soft-page-break/></text:p>
      <text:h text:style-name="Heading_20_2" text:outline-level="2">Parameters used in examples</text:h>
      <text:p text:style-name="Standard">Three example parameter sets used in the simulation script (each runs a sinusoidal voltage):</text:p>
      <text:p text:style-name="Standard"/>
      <text:p text:style-name="Standard">- Set 1: A = 1.5 V, f = 0.5 Hz, dt = 1e-4 s</text:p>
      <text:p text:style-name="Standard">- Set 2: A = 2.5 V, f = 1.0 Hz, dt = 5e-5 s</text:p>
      <text:p text:style-name="Standard">- Set 3: A = 0.8 V, f = 0.2 Hz, dt = 2e-4 s</text:p>
      <text:p text:style-name="Standard"/>
      <text:p text:style-name="Standard">You can customize amplitude `A`, frequency `f`, simulation time `T`, and initial `x0` by editing `tests/hp_simulations.py`.</text:p>
      <text:p text:style-name="Standard"/>
      <text:h text:style-name="Heading_20_2" text:outline-level="2">Figures included</text:h>
      <text:p text:style-name="Standard">The simulation script generates the figures and saves them as PNGs. See the project root (or `tests` output) after running the script.</text:p>
      <text:p text:style-name="Standard"/>
      <text:h text:style-name="Heading_20_2" text:outline-level="2">References</text:h>
      <text:p text:style-name="Standard">- Strukov, D. B., Snider, G. S., Stewart, D. R., &amp; Williams, R. S. (2008). The missing memristor found. Nature, 453(7191), 80–83.</text:p>
      <text:p text:style-name="Standard"/>
      <text:p text:style-name="Standard">---</text:p>
      <text:p text:style-name="Standard"/>
      <text:p text:style-name="Standard">Generated by tooling in the repository to illustrate the HP memristor model and example outputs.</text:p>
      <text:p text:style-name="Standard"/>
      <text:h text:style-name="P15" text:outline-level="2">hp_vi_set1.png</text:h>
      <text:p text:style-name="Standard"><draw:frame draw:style-name="fr1" draw:name="Picture 1" text:anchor-type="as-char" svg:width="6in" svg:height="4in" draw:z-index="0"><draw:image xlink:href="Pictures/100000010000038400000258217FDB4F.png" xlink:type="simple" xlink:show="embed" xlink:actuate="onLoad" draw:mime-type="image/png"/></draw:frame></text:p>
      <text:p text:style-name="Standard">Figure: hp_vi_set1.png</text:p>
      <text:p text:style-name="Standard"/>
      <text:h text:style-name="P15" text:outline-level="2">hp_x_set1.png</text:h>
      <text:p text:style-name="Standard"><draw:frame draw:style-name="fr1" draw:name="Picture 2" text:anchor-type="as-char" svg:width="6in" svg:height="3in" draw:z-index="1"><draw:image xlink:href="Pictures/1000000100000384000001C2C15C34C3.png" xlink:type="simple" xlink:show="embed" xlink:actuate="onLoad" draw:mime-type="image/png"/></draw:frame></text:p>
      <text:p text:style-name="Standard">Figure: hp_x_set1.png</text:p>
      <text:p text:style-name="Standard"/>
      <text:h text:style-name="P15" text:outline-level="2">hp_r_set1.png</text:h>
      <text:p text:style-name="Standard"><draw:frame draw:style-name="fr1" draw:name="Picture 3" text:anchor-type="as-char" svg:width="6in" svg:height="3in" draw:z-index="2"><draw:image xlink:href="Pictures/1000000100000384000001C266F14E94.png" xlink:type="simple" xlink:show="embed" xlink:actuate="onLoad" draw:mime-type="image/png"/></draw:frame></text:p>
      <text:p text:style-name="Standard">Figure: hp_r_set1.png</text:p>
      <text:p text:style-name="Standard"/>
      <text:h text:style-name="P15" text:outline-level="2">hp_vi_set2.png</text:h>
      <text:p text:style-name="Standard"><draw:frame draw:style-name="fr1" draw:name="Picture 4" text:anchor-type="as-char" svg:width="6in" svg:height="4in" draw:z-index="3"><draw:image xlink:href="Pictures/1000000100000384000002580C69A285.png" xlink:type="simple" xlink:show="embed" xlink:actuate="onLoad" draw:mime-type="image/png"/></draw:frame></text:p>
      <text:p text:style-name="Standard">Figure: hp_vi_set2.png</text:p>
      <text:p text:style-name="Standard"/>
      <text:h text:style-name="P15" text:outline-level="2">hp_x_set2.png</text:h>
      <text:p text:style-name="Standard"><draw:frame draw:style-name="fr1" draw:name="Picture 5" text:anchor-type="as-char" svg:width="6in" svg:height="3in" draw:z-index="4"><draw:image xlink:href="Pictures/1000000100000384000001C2A386F4CC.png" xlink:type="simple" xlink:show="embed" xlink:actuate="onLoad" draw:mime-type="image/png"/></draw:frame></text:p>
      <text:p text:style-name="Standard">Figure: hp_x_set2.png</text:p>
      <text:p text:style-name="Standard"/>
      <text:h text:style-name="P15" text:outline-level="2">hp_r_set2.png</text:h>
      <text:p text:style-name="Standard"><draw:frame draw:style-name="fr1" draw:name="Picture 6" text:anchor-type="as-char" svg:width="6in" svg:height="3in" draw:z-index="5"><draw:image xlink:href="Pictures/1000000100000384000001C20EEA5725.png" xlink:type="simple" xlink:show="embed" xlink:actuate="onLoad" draw:mime-type="image/png"/></draw:frame></text:p>
      <text:p text:style-name="Standard">Figure: hp_r_set2.png</text:p>
      <text:p text:style-name="Standard"/>
      <text:h text:style-name="P15" text:outline-level="2">hp_vi_set3.png</text:h>
      <text:p text:style-name="Standard"><draw:frame draw:style-name="fr1" draw:name="Picture 7" text:anchor-type="as-char" svg:width="6in" svg:height="4in" draw:z-index="6"><draw:image xlink:href="Pictures/100000010000038400000258AE29148D.png" xlink:type="simple" xlink:show="embed" xlink:actuate="onLoad" draw:mime-type="image/png"/></draw:frame></text:p>
      <text:p text:style-name="Standard">Figure: hp_vi_set3.png</text:p>
      <text:p text:style-name="Standard"/>
      <text:h text:style-name="P15" text:outline-level="2">hp_x_set3.png</text:h>
      <text:p text:style-name="Standard"><draw:frame draw:style-name="fr1" draw:name="Picture 8" text:anchor-type="as-char" svg:width="6in" svg:height="3in" draw:z-index="7"><draw:image xlink:href="Pictures/1000000100000384000001C224B6B09D.png" xlink:type="simple" xlink:show="embed" xlink:actuate="onLoad" draw:mime-type="image/png"/></draw:frame></text:p>
      <text:p text:style-name="Standard">Figure: hp_x_set3.png</text:p>
      <text:p text:style-name="Standard"/>
      <text:h text:style-name="P15" text:outline-level="2">hp_r_set3.png</text:h>
      <text:p text:style-name="Standard"><draw:frame draw:style-name="fr1" draw:name="Picture 9" text:anchor-type="as-char" svg:width="6in" svg:height="3in" draw:z-index="8"><draw:image xlink:href="Pictures/1000000100000384000001C23E005757.png" xlink:type="simple" xlink:show="embed" xlink:actuate="onLoad" draw:mime-type="image/png"/></draw:frame></text:p>
      <text:p text:style-name="Standard">Figure: hp_r_set3.p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6-07-09T16:07:37.659894839</dc:date>
    <meta:editing-duration>PT2M44S</meta:editing-duration>
    <meta:generator>LibreOffice/25.8.7.3$Linux_X86_64 LibreOffice_project/580$Build-3</meta:generator>
    <meta:document-statistic meta:table-count="0" meta:image-count="9" meta:object-count="0" meta:page-count="15" meta:paragraph-count="145" meta:word-count="632" meta:character-count="4160" meta:non-whitespace-character-count="3461"/>
    <meta:user-defined meta:name="AppVersion">14.0000</meta:user-defined>
    <meta:template xlink:type="simple" xlink:actuate="onRequest" xlink:title="Normal.dotm" xlink:href=""/>
  </office:meta>
</office:document-meta>
</file>